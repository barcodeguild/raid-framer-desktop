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25844E537E0.png" manifest:media-type="image/png"/>
  <manifest:file-entry manifest:full-path="Pictures/10000001000000A200000092015F0D42.png" manifest:media-type="image/png"/>
  <manifest:file-entry manifest:full-path="Pictures/100000010000009C00000096B6EEAF6E.png" manifest:media-type="image/png"/>
  <manifest:file-entry manifest:full-path="Pictures/100000010000009A00000094DA59154A.png" manifest:media-type="image/png"/>
  <manifest:file-entry manifest:full-path="Pictures/100000010000009E0000009282490311.png" manifest:media-type="image/png"/>
  <manifest:file-entry manifest:full-path="Pictures/10000001000000A0000000B49251F88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loext:decorative="false"/>
      <style:paragraph-properties style:writing-mode="lr-tb"/>
    </style:style>
    <style:style style:name="gr4" style:family="graphic" style:parent-style-name="standard">
      <style:graphic-properties draw:fill="solid" draw:fill-color="#ff0000" draw:textarea-vertical-align="middle" draw:auto-grow-height="false" fo:min-height="0.385cm" fo:min-width="2.99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1.337cm" fo:min-width="7.75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="solid" draw:fill-color="#000000" draw:textarea-vertical-align="middle" draw:auto-grow-height="false" fo:min-height="0cm" fo:min-width="19.09cm" loext:decorative="false"/>
    </style:style>
    <style:style style:name="P1" style:family="paragraph">
      <loext:graphic-properties draw:fill="none" draw:fill-color="#ffffff"/>
      <style:text-properties fo:font-size="12pt" fo:font-style="normal" style:text-underline-style="none" fo:font-weight="bold" style:font-size-asian="12pt" style:font-style-asian="normal" style:font-size-complex="12pt" style:font-style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solid" draw:fill-color="#000000"/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fo:font-style="normal" style:text-underline-style="none" fo:font-weight="bold" style:font-size-asian="12pt" style:font-style-asian="normal" style:font-size-complex="12pt" style:font-style-complex="normal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67cm" svg:height="1.038cm" svg:x="2.916cm" svg:y="1.394cm">
          <draw:text-box>
            <text:p><text:span text:style-name="T1">Raid Framer Architecture</text:span></text:p>
          </draw:text-box>
        </draw:frame>
        <draw:frame draw:style-name="gr2" draw:text-style-name="P2" draw:layer="layout" svg:width="1.923cm" svg:height="1.923cm" svg:x="1.082cm" svg:y="1.1cm">
          <draw:image xlink:href="Pictures/10000001000002580000025844E537E0.png" xlink:type="simple" xlink:show="embed" xlink:actuate="onLoad" draw:mime-type="image/png">
            <text:p/>
          </draw:image>
        </draw:frame>
        <draw:frame draw:style-name="gr3" draw:text-style-name="P4" draw:layer="layout" svg:width="3.939cm" svg:height="0.645cm" svg:x="2.916cm" svg:y="2.004cm">
          <draw:text-box>
            <text:p text:style-name="P3"><text:span text:style-name="T2">Desktop Version 2.0 </text:span></text:p>
          </draw:text-box>
        </draw:frame>
        <draw:custom-shape draw:style-name="gr4" draw:text-style-name="P6" draw:layer="layout" svg:width="3.49cm" svg:height="0.635cm" svg:x="11.48cm" svg:y="22.612cm">
          <text:p text:style-name="P5"><text:span text:style-name="T3">Game 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9cm" svg:height="0.635cm" svg:x="11.477cm" svg:y="19.12cm">
          <text:p text:style-name="P5"><text:span text:style-name="T3">Player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9cm" svg:height="0.635cm" svg:x="15.973cm" svg:y="20.82cm">
          <text:p text:style-name="P5"><text:span text:style-name="T3">Event 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9cm" svg:height="0.635cm" svg:x="6.715cm" svg:y="22.612cm">
          <text:p text:style-name="P5"><text:span text:style-name="T3">Debug 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8.256cm" svg:height="1.587cm" svg:x="6.712cm" svg:y="20.391cm">
          <text:p text:style-name="P7"><text:span text:style-name="T4">⟳ Abstract Interactor Base Class </text:span><text:span text:style-name="T3">⟳</text:span></text:p>
          <text:p text:style-name="P7"><text:span text:style-name="T4">Signal Generator (</text:span><text:span text:style-name="T3"> 5s Interval 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9cm" svg:height="0.635cm" svg:x="6.713cm" svg:y="19.12cm">
          <text:p text:style-name="P5"><text:span text:style-name="T3">Overlay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9cm" svg:height="0.635cm" svg:x="2.235cm" svg:y="20.82cm">
          <text:p text:style-name="P5"><text:span text:style-name="T3">Realtime 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42cm" svg:height="1.93cm" svg:x="18.01cm" svg:y="24.595cm">
          <draw:image xlink:href="Pictures/10000001000000A200000092015F0D42.png" xlink:type="simple" xlink:show="embed" xlink:actuate="onLoad" draw:mime-type="image/png">
            <text:p/>
          </draw:image>
        </draw:frame>
        <draw:frame draw:style-name="gr2" draw:text-style-name="P2" draw:layer="layout" svg:width="2.036cm" svg:height="1.956cm" svg:x="15.57cm" svg:y="24.595cm">
          <draw:image xlink:href="Pictures/100000010000009A00000094DA59154A.png" xlink:type="simple" xlink:show="embed" xlink:actuate="onLoad" draw:mime-type="image/png">
            <text:p/>
          </draw:image>
        </draw:frame>
        <draw:line draw:style-name="gr6" draw:text-style-name="P2" draw:layer="layout" svg:x1="19.097cm" svg:y1="24.495cm" svg:x2="14.97cm" svg:y2="22.907cm">
          <text:p/>
        </draw:line>
        <draw:line draw:style-name="gr6" draw:text-style-name="P2" draw:layer="layout" svg:x1="16.557cm" svg:y1="24.495cm" svg:x2="14.97cm" svg:y2="23.225cm">
          <text:p/>
        </draw:line>
        <draw:frame draw:style-name="gr2" draw:text-style-name="P2" draw:layer="layout" svg:width="2.062cm" svg:height="1.983cm" svg:x="1.478cm" svg:y="24.462cm">
          <draw:image xlink:href="Pictures/100000010000009C00000096B6EEAF6E.png" xlink:type="simple" xlink:show="embed" xlink:actuate="onLoad" draw:mime-type="image/png">
            <text:p/>
          </draw:image>
        </draw:frame>
        <draw:frame draw:style-name="gr2" draw:text-style-name="P2" draw:layer="layout" svg:width="2.089cm" svg:height="1.93cm" svg:x="3.975cm" svg:y="24.495cm">
          <draw:image xlink:href="Pictures/100000010000009E0000009282490311.png" xlink:type="simple" xlink:show="embed" xlink:actuate="onLoad" draw:mime-type="image/png">
            <text:p/>
          </draw:image>
        </draw:frame>
        <draw:line draw:style-name="gr6" draw:text-style-name="P2" draw:layer="layout" svg:x1="2.587cm" svg:y1="24.495cm" svg:x2="6.715cm" svg:y2="22.907cm">
          <text:p/>
        </draw:line>
        <draw:line draw:style-name="gr6" draw:text-style-name="P2" draw:layer="layout" svg:x1="5.127cm" svg:y1="24.495cm" svg:x2="6.715cm" svg:y2="23.225cm">
          <text:p/>
        </draw:line>
        <draw:frame draw:style-name="gr7" draw:text-style-name="P5" draw:layer="layout" svg:width="2.115cm" svg:height="2.38cm" svg:x="16.03cm" svg:y="15.605cm">
          <draw:image xlink:href="Pictures/10000001000000A0000000B49251F884.png" xlink:type="simple" xlink:show="embed" xlink:actuate="onLoad" draw:mime-type="image/png">
            <text:p/>
          </draw:image>
        </draw:frame>
        <draw:line draw:style-name="gr6" draw:text-style-name="P2" draw:layer="layout" svg:x1="14.97cm" svg:y1="19.097cm" svg:x2="15.922cm" svg:y2="17.51cm">
          <text:p/>
        </draw:line>
        <draw:custom-shape draw:style-name="gr8" draw:text-style-name="P9" draw:layer="layout" svg:width="19.59cm" svg:height="0.047cm" svg:x="1cm" svg:y="15.28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02:10:01.115728200</meta:creation-date>
    <dc:date>2025-11-22T14:58:40.104220500</dc:date>
    <meta:editing-duration>PT48M48S</meta:editing-duration>
    <meta:editing-cycles>6</meta:editing-cycles>
    <meta:generator>LibreOffice/25.8.2.2$Windows_X86_64 LibreOffice_project/d401f2107ccab8f924a8e2df40f573aab7605b6f</meta:generator>
    <meta:document-statistic meta:object-count="21"/>
  </office:meta>
</office:document-meta>
</file>